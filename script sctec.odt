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e" style:master-page-name="MP0" style:family="paragraph">
      <style:paragraph-properties fo:break-before="page"/>
      <style:text-properties fo:language="pt" fo:country="BR"/>
    </style:style>
    <style:style style:name="P2" style:parent-style-name="Normale" style:family="paragraph">
      <style:text-properties fo:language="pt" fo:country="BR"/>
    </style:style>
    <style:style style:name="P3" style:parent-style-name="Normale" style:family="paragraph">
      <style:text-properties fo:language="pt" fo:country="BR"/>
    </style:style>
    <style:style style:name="T4" style:parent-style-name="Car.predefinitoparagrafo" style:family="text">
      <style:text-properties fo:language="pt" fo:country="BR"/>
    </style:style>
    <style:style style:name="P5" style:parent-style-name="Normale" style:family="paragraph">
      <style:text-properties fo:language="pt" fo:country="BR"/>
    </style:style>
    <style:style style:name="P6" style:parent-style-name="Normale" style:family="paragraph">
      <style:text-properties fo:language="pt" fo:country="BR"/>
    </style:style>
    <style:style style:name="P7" style:parent-style-name="Normale" style:family="paragraph">
      <style:text-properties fo:language="pt" fo:country="BR"/>
    </style:style>
    <style:style style:name="P8" style:parent-style-name="Normale" style:family="paragraph">
      <style:text-properties fo:language="pt" fo:country="BR"/>
    </style:style>
    <style:style style:name="P9" style:parent-style-name="Normale" style:family="paragraph">
      <style:text-properties fo:language="pt" fo:country="BR"/>
    </style:style>
    <style:style style:name="P10" style:parent-style-name="Normale" style:family="paragraph">
      <style:text-properties fo:color="#EE0000" fo:language="pt" fo:country="BR"/>
    </style:style>
    <style:style style:name="P11" style:parent-style-name="Normale" style:family="paragraph">
      <style:text-properties fo:color="#EE0000" fo:language="pt" fo:country="BR"/>
    </style:style>
    <style:style style:name="P12" style:parent-style-name="Normale" style:family="paragraph">
      <style:text-properties fo:color="#EE0000" fo:language="pt" fo:country="BR"/>
    </style:style>
    <style:style style:name="P13" style:parent-style-name="Normale" style:family="paragraph">
      <style:text-properties fo:color="#EE0000" fo:language="pt" fo:country="BR"/>
    </style:style>
    <style:style style:name="P14" style:parent-style-name="Normale" style:family="paragraph">
      <style:text-properties fo:language="en" fo:country="GB"/>
    </style:style>
    <style:style style:name="P15" style:parent-style-name="Normale" style:family="paragraph">
      <style:text-properties fo:language="en" fo:country="GB"/>
    </style:style>
    <style:style style:name="P16" style:parent-style-name="Normale" style:family="paragraph">
      <style:text-properties fo:language="en" fo:country="GB"/>
    </style:style>
    <style:style style:name="T17" style:parent-style-name="Car.predefinitoparagrafo" style:family="text">
      <style:text-properties fo:language="en" fo:country="GB"/>
    </style:style>
    <style:style style:name="T18" style:parent-style-name="Car.predefinitoparagrafo" style:family="text">
      <style:text-properties fo:language="pt" fo:country="BR"/>
    </style:style>
    <style:style style:name="P19" style:parent-style-name="Normale" style:family="paragraph">
      <style:text-properties fo:language="pt" fo:country="BR"/>
    </style:style>
    <style:style style:name="P20" style:parent-style-name="Normale" style:family="paragraph">
      <style:text-properties fo:language="pt" fo:country="BR"/>
    </style:style>
    <style:style style:name="P21" style:parent-style-name="Normale" style:family="paragraph">
      <style:text-properties fo:language="pt" fo:country="BR"/>
    </style:style>
    <style:style style:name="P22" style:parent-style-name="Normale" style:family="paragraph">
      <style:text-properties fo:color="#EE0000" fo:language="pt" fo:country="BR"/>
    </style:style>
    <style:style style:name="P23" style:parent-style-name="Normale" style:family="paragraph">
      <style:text-properties fo:color="#EE0000" fo:language="pt" fo:country="BR"/>
    </style:style>
    <style:style style:name="P24" style:parent-style-name="Normale" style:family="paragraph">
      <style:text-properties fo:color="#EE0000" fo:language="pt" fo:country="BR"/>
    </style:style>
    <style:style style:name="P25" style:parent-style-name="Normale" style:family="paragraph">
      <style:text-properties fo:color="#EE0000" fo:language="pt" fo:country="BR"/>
    </style:style>
    <style:style style:name="P26" style:parent-style-name="Normale" style:family="paragraph">
      <style:text-properties fo:language="pt" fo:country="BR"/>
    </style:style>
    <style:style style:name="P27" style:parent-style-name="Normale" style:family="paragraph">
      <style:text-properties fo:color="#EE0000" fo:language="pt" fo:country="BR"/>
    </style:style>
    <style:style style:name="P28" style:parent-style-name="Normale" style:family="paragraph">
      <style:text-properties fo:color="#EE0000" fo:language="pt" fo:country="BR"/>
    </style:style>
    <style:style style:name="P29" style:parent-style-name="Normale" style:family="paragraph">
      <style:text-properties fo:color="#EE0000" fo:language="pt" fo:country="BR"/>
    </style:style>
    <style:style style:name="P30" style:parent-style-name="Normale" style:family="paragraph">
      <style:text-properties fo:color="#EE0000" fo:language="pt" fo:country="BR"/>
    </style:style>
    <style:style style:name="P31" style:parent-style-name="Normale" style:family="paragraph">
      <style:text-properties fo:color="#EE0000" fo:language="pt" fo:country="BR"/>
    </style:style>
    <style:style style:name="P32" style:parent-style-name="Normale" style:family="paragraph">
      <style:text-properties fo:language="pt" fo:country="BR"/>
    </style:style>
    <style:style style:name="P33" style:parent-style-name="Normale" style:family="paragraph">
      <style:text-properties fo:language="pt" fo:country="BR"/>
    </style:style>
    <style:style style:name="P34" style:parent-style-name="Normale" style:family="paragraph">
      <style:text-properties fo:language="pt" fo:country="BR"/>
    </style:style>
    <style:style style:name="P35" style:parent-style-name="Normale" style:family="paragraph">
      <style:text-properties fo:language="pt" fo:country="BR"/>
    </style:style>
    <style:style style:name="P36" style:parent-style-name="Normale" style:family="paragraph">
      <style:text-properties fo:language="pt" fo:country="BR"/>
    </style:style>
    <style:style style:name="P37" style:parent-style-name="Normale" style:family="paragraph">
      <style:text-properties fo:language="pt" fo:country="BR"/>
    </style:style>
    <style:style style:name="P38" style:parent-style-name="Normale" style:family="paragraph">
      <style:text-properties fo:language="pt" fo:country="BR"/>
    </style:style>
    <style:style style:name="P39" style:parent-style-name="Normale" style:family="paragraph">
      <style:text-properties fo:language="pt" fo:country="BR"/>
    </style:style>
    <style:style style:name="P40" style:parent-style-name="Normale" style:family="paragraph">
      <style:text-properties fo:color="#EE0000" fo:language="pt" fo:country="BR"/>
    </style:style>
    <style:style style:name="P41" style:parent-style-name="Normale" style:family="paragraph">
      <style:text-properties fo:color="#EE0000" fo:language="pt" fo:country="BR"/>
    </style:style>
    <style:style style:name="P42" style:parent-style-name="Normale" style:family="paragraph">
      <style:text-properties fo:color="#EE0000" fo:language="pt" fo:country="BR"/>
    </style:style>
    <style:style style:name="P43" style:parent-style-name="Normale" style:family="paragraph">
      <style:text-properties fo:color="#EE0000" fo:language="pt" fo:country="BR"/>
    </style:style>
    <style:style style:name="P44" style:parent-style-name="Normale" style:family="paragraph">
      <style:text-properties fo:language="pt" fo:country="BR"/>
    </style:style>
    <style:style style:name="P45" style:parent-style-name="Normale" style:family="paragraph">
      <style:text-properties fo:language="pt" fo:country="BR"/>
    </style:style>
    <style:style style:name="P46" style:parent-style-name="Normale" style:family="paragraph">
      <style:text-properties fo:language="pt" fo:country="BR"/>
    </style:style>
    <style:style style:name="P47" style:parent-style-name="Normale" style:family="paragraph">
      <style:text-properties fo:language="pt" fo:country="BR"/>
    </style:style>
    <style:style style:name="P48" style:parent-style-name="Normale" style:family="paragraph">
      <style:text-properties fo:color="#EE0000" fo:language="pt" fo:country="BR"/>
    </style:style>
    <style:style style:name="P49" style:parent-style-name="Normale" style:family="paragraph">
      <style:text-properties fo:color="#EE0000" fo:language="pt" fo:country="BR"/>
    </style:style>
    <style:style style:name="P50" style:parent-style-name="Normale" style:family="paragraph">
      <style:text-properties fo:color="#EE0000" fo:language="pt" fo:country="BR"/>
    </style:style>
    <style:style style:name="P51" style:parent-style-name="Normale" style:family="paragraph">
      <style:text-properties fo:color="#EE0000" fo:language="pt" fo:country="BR"/>
    </style:style>
    <style:style style:name="P52" style:parent-style-name="Normale" style:family="paragraph">
      <style:text-properties fo:color="#EE0000" fo:language="pt" fo:country="BR"/>
    </style:style>
    <style:style style:name="P53" style:parent-style-name="Normale" style:family="paragraph">
      <style:text-properties fo:language="pt" fo:country="BR"/>
    </style:style>
    <style:style style:name="P54" style:parent-style-name="Normale" style:family="paragraph">
      <style:text-properties fo:language="pt" fo:country="BR"/>
    </style:style>
    <style:style style:name="P55" style:parent-style-name="Normale" style:family="paragraph">
      <style:text-properties fo:color="#EE0000" fo:language="pt" fo:country="BR"/>
    </style:style>
    <style:style style:name="P56" style:parent-style-name="Normale" style:family="paragraph">
      <style:text-properties fo:color="#EE0000" fo:language="pt" fo:country="BR"/>
    </style:style>
    <style:style style:name="P57" style:parent-style-name="Normale" style:family="paragraph">
      <style:text-properties fo:language="pt" fo:country="BR"/>
    </style:style>
    <style:style style:name="P58" style:parent-style-name="Normale" style:family="paragraph">
      <style:text-properties fo:language="pt" fo:country="BR"/>
    </style:style>
    <style:style style:name="P59" style:parent-style-name="Normale" style:family="paragraph">
      <style:text-properties fo:language="pt" fo:country="BR"/>
    </style:style>
    <style:style style:name="P60" style:parent-style-name="Normale" style:family="paragraph">
      <style:text-properties fo:language="pt" fo:country="BR"/>
    </style:style>
    <style:style style:name="P61" style:parent-style-name="Normale" style:family="paragraph">
      <style:text-properties fo:language="pt" fo:country="BR"/>
    </style:style>
    <style:style style:name="P62" style:parent-style-name="Normale" style:family="paragraph">
      <style:text-properties fo:language="pt" fo:country="BR"/>
    </style:style>
    <style:style style:name="P63" style:parent-style-name="Normale" style:family="paragraph">
      <style:text-properties fo:language="pt" fo:country="BR"/>
    </style:style>
    <style:style style:name="P64" style:parent-style-name="Normale" style:family="paragraph">
      <style:text-properties fo:language="pt" fo:country="BR"/>
    </style:style>
    <style:style style:name="P65" style:parent-style-name="Normale" style:family="paragraph">
      <style:text-properties fo:color="#EE0000" fo:language="pt" fo:country="BR"/>
    </style:style>
    <style:style style:name="P66" style:parent-style-name="Normale" style:family="paragraph">
      <style:text-properties fo:color="#EE0000" fo:language="pt" fo:country="BR"/>
    </style:style>
    <style:style style:name="P67" style:parent-style-name="Normale" style:family="paragraph">
      <style:text-properties fo:color="#EE0000" fo:language="pt" fo:country="BR"/>
    </style:style>
    <style:style style:name="P68" style:parent-style-name="Normale" style:family="paragraph">
      <style:text-properties fo:color="#EE0000" fo:language="pt" fo:country="BR"/>
    </style:style>
    <style:style style:name="P69" style:parent-style-name="Normale" style:family="paragraph">
      <style:text-properties fo:language="en" fo:country="GB"/>
    </style:style>
    <style:style style:name="P70" style:parent-style-name="Normale" style:family="paragraph">
      <style:text-properties fo:language="en" fo:country="GB"/>
    </style:style>
    <style:style style:name="P71" style:parent-style-name="Normale" style:family="paragraph">
      <style:text-properties fo:language="en" fo:country="GB"/>
    </style:style>
    <style:style style:name="T72" style:parent-style-name="Car.predefinitoparagrafo" style:family="text">
      <style:text-properties fo:language="en" fo:country="GB"/>
    </style:style>
    <style:style style:name="T73" style:parent-style-name="Car.predefinitoparagrafo" style:family="text">
      <style:text-properties fo:language="pt" fo:country="BR"/>
    </style:style>
    <style:style style:name="P74" style:parent-style-name="Normale" style:family="paragraph">
      <style:text-properties fo:language="pt" fo:country="BR"/>
    </style:style>
    <style:style style:name="T75" style:parent-style-name="Car.predefinitoparagrafo" style:family="text">
      <style:text-properties fo:language="pt" fo:country="BR"/>
    </style:style>
    <style:style style:name="T76" style:parent-style-name="Car.predefinitoparagrafo" style:family="text">
      <style:text-properties fo:language="en" fo:country="GB"/>
    </style:style>
    <style:style style:name="P77" style:parent-style-name="Normale" style:family="paragraph">
      <style:text-properties fo:language="en" fo:country="GB"/>
    </style:style>
    <style:style style:name="P78" style:parent-style-name="Normale" style:family="paragraph">
      <style:text-properties fo:language="en" fo:country="GB"/>
    </style:style>
    <style:style style:name="P79" style:parent-style-name="Normale" style:family="paragraph">
      <style:text-properties fo:language="en" fo:country="GB"/>
    </style:style>
    <style:style style:name="P80" style:parent-style-name="Normale" style:family="paragraph">
      <style:text-properties fo:language="en" fo:country="GB"/>
    </style:style>
    <style:style style:name="P81" style:parent-style-name="Normale" style:family="paragraph">
      <style:text-properties fo:language="en" fo:country="GB"/>
    </style:style>
    <style:style style:name="P82" style:parent-style-name="Normale" style:family="paragraph">
      <style:text-properties fo:language="en" fo:country="GB"/>
    </style:style>
    <style:style style:name="P83" style:parent-style-name="Normale" style:family="paragraph">
      <style:text-properties fo:language="en" fo:country="GB"/>
    </style:style>
    <style:style style:name="T84" style:parent-style-name="Car.predefinitoparagrafo" style:family="text">
      <style:text-properties fo:language="en" fo:country="GB"/>
    </style:style>
    <style:style style:name="T85" style:parent-style-name="Car.predefinitoparagrafo" style:family="text">
      <style:text-properties fo:language="pt" fo:country="BR"/>
    </style:style>
    <style:style style:name="P86" style:parent-style-name="Normale" style:family="paragraph">
      <style:text-properties fo:language="pt" fo:country="BR"/>
    </style:style>
    <style:style style:name="P87" style:parent-style-name="Normale" style:family="paragraph">
      <style:text-properties fo:language="pt" fo:country="BR"/>
    </style:style>
    <style:style style:name="P88" style:parent-style-name="Normale" style:family="paragraph">
      <style:text-properties fo:language="pt" fo:country="BR"/>
    </style:style>
    <style:style style:name="P89" style:parent-style-name="Normale" style:family="paragraph">
      <style:text-properties fo:language="pt" fo:country="BR"/>
    </style:style>
    <style:style style:name="P90" style:parent-style-name="Normale" style:family="paragraph">
      <style:text-properties fo:language="pt" fo:country="BR"/>
    </style:style>
    <style:style style:name="P91" style:parent-style-name="Normale" style:family="paragraph">
      <style:text-properties fo:language="pt" fo:country="BR"/>
    </style:style>
    <style:style style:name="P92" style:parent-style-name="Normale" style:family="paragraph">
      <style:text-properties fo:language="pt" fo:country="BR"/>
    </style:style>
    <style:style style:name="P93" style:parent-style-name="Normale" style:family="paragraph">
      <style:text-properties fo:language="pt" fo:country="BR"/>
    </style:style>
    <style:style style:name="P94" style:parent-style-name="Normale" style:family="paragraph">
      <style:text-properties fo:language="pt" fo:country="BR"/>
    </style:style>
    <style:style style:name="P95" style:parent-style-name="Normale" style:family="paragraph">
      <style:text-properties fo:language="pt" fo:country="BR"/>
    </style:style>
    <style:style style:name="P96" style:parent-style-name="Normale" style:family="paragraph">
      <style:text-properties fo:language="pt" fo:country="BR"/>
    </style:style>
    <style:style style:name="P97" style:parent-style-name="Normale" style:family="paragraph">
      <style:text-properties fo:language="pt" fo:country="BR"/>
    </style:style>
    <style:style style:name="P98" style:parent-style-name="Normale" style:family="paragraph">
      <style:text-properties fo:color="#EE0000" fo:language="pt" fo:country="BR"/>
    </style:style>
    <style:style style:name="P99" style:parent-style-name="Normale" style:family="paragraph">
      <style:text-properties fo:color="#EE0000" fo:language="pt" fo:country="BR"/>
    </style:style>
    <style:style style:name="P100" style:parent-style-name="Normale" style:family="paragraph">
      <style:text-properties fo:color="#EE0000" fo:language="pt" fo:country="BR"/>
    </style:style>
    <style:style style:name="P101" style:parent-style-name="Normale" style:family="paragraph">
      <style:text-properties fo:color="#EE0000" fo:language="pt" fo:country="BR"/>
    </style:style>
    <style:style style:name="P102" style:parent-style-name="Normale" style:family="paragraph">
      <style:text-properties fo:color="#EE0000" fo:language="pt" fo:country="BR"/>
    </style:style>
    <style:style style:name="P103" style:parent-style-name="Normale" style:family="paragraph">
      <style:text-properties fo:color="#EE0000" fo:language="pt" fo:country="BR"/>
    </style:style>
    <style:style style:name="P104" style:parent-style-name="Normale" style:family="paragraph">
      <style:text-properties fo:language="pt" fo:country="BR"/>
    </style:style>
    <style:style style:name="P105" style:parent-style-name="Normale" style:family="paragraph">
      <style:text-properties fo:language="pt" fo:country="BR"/>
    </style:style>
    <style:style style:name="P106" style:parent-style-name="Normale" style:family="paragraph">
      <style:text-properties fo:language="pt" fo:country="BR"/>
    </style:style>
    <style:style style:name="P107" style:parent-style-name="Normale" style:family="paragraph">
      <style:text-properties fo:language="pt" fo:country="BR"/>
    </style:style>
    <style:style style:name="P108" style:parent-style-name="Normale" style:family="paragraph">
      <style:text-properties fo:language="pt" fo:country="BR"/>
    </style:style>
    <style:style style:name="P109" style:parent-style-name="Normale" style:family="paragraph">
      <style:text-properties fo:color="#EE0000" fo:language="pt" fo:country="BR"/>
    </style:style>
    <style:style style:name="P110" style:parent-style-name="Normale" style:family="paragraph">
      <style:text-properties fo:color="#EE0000" fo:language="pt" fo:country="BR"/>
    </style:style>
    <style:style style:name="P111" style:parent-style-name="Normale" style:family="paragraph">
      <style:text-properties fo:color="#EE0000" fo:language="pt" fo:country="BR"/>
    </style:style>
    <style:style style:name="P112" style:parent-style-name="Normale" style:family="paragraph">
      <style:text-properties fo:color="#EE0000" fo:language="pt" fo:country="BR"/>
    </style:style>
    <style:style style:name="P113" style:parent-style-name="Normale" style:family="paragraph">
      <style:text-properties fo:color="#EE0000" fo:language="pt" fo:country="BR"/>
    </style:style>
    <style:style style:name="P114" style:parent-style-name="Normale" style:family="paragraph">
      <style:text-properties fo:language="pt" fo:country="BR"/>
    </style:style>
    <style:style style:name="P115" style:parent-style-name="Normale" style:family="paragraph">
      <style:text-properties fo:color="#EE0000" fo:language="pt" fo:country="BR"/>
    </style:style>
    <style:style style:name="P116" style:parent-style-name="Normale" style:family="paragraph">
      <style:text-properties fo:color="#EE0000" fo:language="pt" fo:country="BR"/>
    </style:style>
    <style:style style:name="P117" style:parent-style-name="Normale" style:family="paragraph">
      <style:text-properties fo:language="pt" fo:country="BR"/>
    </style:style>
    <style:style style:name="P118" style:parent-style-name="Normale" style:family="paragraph">
      <style:text-properties fo:language="pt" fo:country="BR"/>
    </style:style>
    <style:style style:name="P119" style:parent-style-name="Normale" style:family="paragraph">
      <style:text-properties fo:language="pt" fo:country="BR"/>
    </style:style>
    <style:style style:name="P120" style:parent-style-name="Normale" style:family="paragraph">
      <style:text-properties fo:color="#EE0000" fo:language="pt" fo:country="BR"/>
    </style:style>
    <style:style style:name="P121" style:parent-style-name="Normale" style:family="paragraph">
      <style:text-properties fo:color="#EE0000" fo:language="pt" fo:country="BR"/>
    </style:style>
    <style:style style:name="P122" style:parent-style-name="Normale" style:family="paragraph">
      <style:text-properties fo:color="#EE0000" fo:language="pt" fo:country="BR"/>
    </style:style>
    <style:style style:name="P123" style:parent-style-name="Normale" style:family="paragraph">
      <style:text-properties fo:language="pt" fo:country="BR"/>
    </style:style>
    <style:style style:name="P124" style:parent-style-name="Normale" style:family="paragraph">
      <style:text-properties fo:language="pt" fo:country="BR"/>
    </style:style>
    <style:style style:name="P125" style:parent-style-name="Normale" style:family="paragraph">
      <style:text-properties fo:language="pt" fo:country="BR"/>
    </style:style>
    <style:style style:name="P126" style:parent-style-name="Normale" style:family="paragraph">
      <style:text-properties fo:language="pt" fo:country="BR"/>
    </style:style>
    <style:style style:name="T127" style:parent-style-name="Car.predefinitoparagrafo" style:family="text">
      <style:text-properties fo:language="pt" fo:country="BR"/>
    </style:style>
    <style:style style:name="T128" style:parent-style-name="Car.predefinitoparagrafo" style:family="text">
      <style:text-properties fo:color="#EE0000" fo:language="pt" fo:country="BR"/>
    </style:style>
    <style:style style:name="P129" style:parent-style-name="Normale" style:family="paragraph">
      <style:text-properties fo:color="#EE0000" fo:language="pt" fo:country="BR"/>
    </style:style>
    <style:style style:name="P130" style:parent-style-name="Normale" style:family="paragraph">
      <style:text-properties fo:color="#EE0000" fo:language="pt" fo:country="BR"/>
    </style:style>
    <style:style style:name="P131" style:parent-style-name="Normale" style:family="paragraph">
      <style:text-properties fo:color="#EE0000" fo:language="pt" fo:country="BR"/>
    </style:style>
    <style:style style:name="P132" style:parent-style-name="Normale" style:family="paragraph">
      <style:text-properties fo:language="pt" fo:country="BR"/>
    </style:style>
    <style:style style:name="P133" style:parent-style-name="Normale" style:family="paragraph">
      <style:text-properties fo:language="pt" fo:country="BR"/>
    </style:style>
    <style:style style:name="P134" style:parent-style-name="Normale" style:family="paragraph">
      <style:text-properties fo:language="pt" fo:country="BR"/>
    </style:style>
    <style:style style:name="P135" style:parent-style-name="Normale" style:family="paragraph">
      <style:text-properties fo:color="#EE0000" fo:language="pt" fo:country="BR"/>
    </style:style>
    <style:style style:name="P136" style:parent-style-name="Normale" style:family="paragraph">
      <style:text-properties fo:color="#EE0000" fo:language="pt" fo:country="BR"/>
    </style:style>
    <style:style style:name="P137" style:parent-style-name="Normale" style:family="paragraph">
      <style:text-properties fo:language="pt" fo:country="BR"/>
    </style:style>
    <style:style style:name="P138" style:parent-style-name="Normale" style:family="paragraph">
      <style:text-properties fo:language="pt" fo:country="BR"/>
    </style:style>
    <style:style style:name="P139" style:parent-style-name="Normale" style:family="paragraph">
      <style:text-properties fo:language="pt" fo:country="BR"/>
    </style:style>
    <style:style style:name="P140" style:parent-style-name="Normale" style:family="paragraph">
      <style:text-properties fo:language="pt" fo:country="BR"/>
    </style:style>
    <style:style style:name="P141" style:parent-style-name="Normale" style:family="paragraph">
      <style:text-properties fo:language="pt" fo:country="BR"/>
    </style:style>
    <style:style style:name="P142" style:parent-style-name="Normale" style:family="paragraph">
      <style:text-properties fo:language="pt" fo:country="BR"/>
    </style:style>
    <style:style style:name="P143" style:parent-style-name="Normale" style:family="paragraph">
      <style:text-properties fo:language="pt" fo:country="BR"/>
    </style:style>
    <style:style style:name="P144" style:parent-style-name="Normale" style:family="paragraph">
      <style:text-properties fo:language="pt" fo:country="BR"/>
    </style:style>
    <style:style style:name="P145" style:parent-style-name="Normale" style:family="paragraph">
      <style:text-properties fo:color="#EE0000" fo:language="pt" fo:country="BR"/>
    </style:style>
    <style:style style:name="P146" style:parent-style-name="Normale" style:family="paragraph">
      <style:text-properties fo:color="#EE0000" fo:language="pt" fo:country="BR"/>
    </style:style>
    <style:style style:name="P147" style:parent-style-name="Normale" style:family="paragraph">
      <style:text-properties fo:language="pt" fo:country="BR"/>
    </style:style>
    <style:style style:name="P148" style:parent-style-name="Normale" style:family="paragraph">
      <style:text-properties fo:language="pt" fo:country="BR"/>
    </style:style>
    <style:style style:name="P149" style:parent-style-name="Normale" style:family="paragraph">
      <style:text-properties fo:language="pt" fo:country="BR"/>
    </style:style>
    <style:style style:name="P150" style:parent-style-name="Normale" style:family="paragraph">
      <style:text-properties fo:language="pt" fo:country="BR"/>
    </style:style>
    <style:style style:name="P151" style:parent-style-name="Normale" style:family="paragraph">
      <style:text-properties fo:language="pt" fo:country="BR"/>
    </style:style>
    <style:style style:name="P152" style:parent-style-name="Normale" style:family="paragraph">
      <style:text-properties fo:color="#EE0000" fo:language="pt" fo:country="BR"/>
    </style:style>
    <style:style style:name="P153" style:parent-style-name="Normale" style:family="paragraph">
      <style:text-properties fo:color="#EE0000" fo:language="pt" fo:country="BR"/>
    </style:style>
    <style:style style:name="P154" style:parent-style-name="Normale" style:family="paragraph">
      <style:text-properties fo:color="#EE0000" fo:language="pt" fo:country="BR"/>
    </style:style>
    <style:style style:name="P155" style:parent-style-name="Normale" style:family="paragraph">
      <style:text-properties fo:language="pt" fo:country="BR"/>
    </style:style>
    <style:style style:name="P156" style:parent-style-name="Normale" style:family="paragraph">
      <style:text-properties fo:language="pt" fo:country="BR"/>
    </style:style>
    <style:style style:name="P157" style:parent-style-name="Normale" style:family="paragraph">
      <style:text-properties fo:language="pt" fo:country="BR"/>
    </style:style>
    <style:style style:name="P158" style:parent-style-name="Normale" style:family="paragraph">
      <style:text-properties fo:language="pt" fo:country="BR"/>
    </style:style>
    <style:style style:name="P159" style:parent-style-name="Normale" style:family="paragraph">
      <style:text-properties fo:language="pt" fo:country="BR"/>
    </style:style>
    <style:style style:name="P160" style:parent-style-name="Normale" style:family="paragraph">
      <style:text-properties fo:color="#EE0000" fo:language="pt" fo:country="BR"/>
    </style:style>
    <style:style style:name="P161" style:parent-style-name="Normale" style:family="paragraph">
      <style:text-properties fo:color="#EE0000" fo:language="pt" fo:country="BR"/>
    </style:style>
    <style:style style:name="P162" style:parent-style-name="Normale" style:family="paragraph">
      <style:text-properties fo:color="#EE0000" fo:language="pt" fo:country="BR"/>
    </style:style>
    <style:style style:name="P163" style:parent-style-name="Normale" style:family="paragraph">
      <style:text-properties fo:color="#EE0000" fo:language="pt" fo:country="BR"/>
    </style:style>
    <style:style style:name="P164" style:parent-style-name="Normale" style:family="paragraph">
      <style:text-properties fo:language="pt" fo:country="BR"/>
    </style:style>
    <style:style style:name="P165" style:parent-style-name="Normale" style:family="paragraph">
      <style:text-properties fo:language="pt" fo:country="BR"/>
    </style:style>
    <style:style style:name="T166" style:parent-style-name="Car.predefinitoparagrafo" style:family="text">
      <style:text-properties fo:language="pt" fo:country="BR"/>
    </style:style>
    <style:style style:name="T167" style:parent-style-name="Car.predefinitoparagrafo" style:family="text">
      <style:text-properties fo:language="en" fo:country="GB"/>
    </style:style>
    <style:style style:name="P168" style:parent-style-name="Normale" style:family="paragraph">
      <style:text-properties fo:language="en" fo:country="GB"/>
    </style:style>
    <style:style style:name="P169" style:parent-style-name="Normale" style:family="paragraph">
      <style:text-properties fo:language="en" fo:country="GB"/>
    </style:style>
    <style:style style:name="T170" style:parent-style-name="Car.predefinitoparagrafo" style:family="text">
      <style:text-properties fo:language="en" fo:country="GB"/>
    </style:style>
    <style:style style:name="T171" style:parent-style-name="Car.predefinitoparagrafo" style:family="text">
      <style:text-properties fo:language="pt" fo:country="BR"/>
    </style:style>
    <style:style style:name="P172" style:parent-style-name="Normale" style:family="paragraph">
      <style:text-properties fo:language="pt" fo:country="BR"/>
    </style:style>
    <style:style style:name="P173" style:parent-style-name="Normale" style:family="paragraph">
      <style:text-properties fo:language="pt" fo:country="BR"/>
    </style:style>
    <style:style style:name="P174" style:parent-style-name="Normale" style:family="paragraph">
      <style:text-properties fo:color="#EE0000" fo:language="pt" fo:country="BR"/>
    </style:style>
    <style:style style:name="P175" style:parent-style-name="Normale" style:family="paragraph">
      <style:text-properties fo:color="#EE0000" fo:language="pt" fo:country="BR"/>
    </style:style>
    <style:style style:name="P176" style:parent-style-name="Normale" style:family="paragraph">
      <style:text-properties fo:color="#EE0000" fo:language="pt" fo:country="BR"/>
    </style:style>
    <style:style style:name="P177" style:parent-style-name="Normale" style:family="paragraph">
      <style:text-properties fo:color="#EE0000" fo:language="pt" fo:country="BR"/>
    </style:style>
    <style:style style:name="P178" style:parent-style-name="Normale" style:family="paragraph">
      <style:text-properties fo:color="#EE0000" fo:language="pt" fo:country="BR"/>
    </style:style>
    <style:style style:name="P179" style:parent-style-name="Normale" style:family="paragraph">
      <style:text-properties fo:color="#EE0000" fo:language="pt" fo:country="BR"/>
    </style:style>
    <style:style style:name="P180" style:parent-style-name="Normale" style:family="paragraph">
      <style:text-properties fo:color="#EE0000" fo:language="pt" fo:country="BR"/>
    </style:style>
    <style:style style:name="P181" style:parent-style-name="Normale" style:family="paragraph">
      <style:text-properties fo:language="pt" fo:country="BR"/>
    </style:style>
    <style:style style:name="P182" style:parent-style-name="Normale" style:family="paragraph">
      <style:text-properties fo:language="pt" fo:country="BR"/>
    </style:style>
    <style:style style:name="P183" style:parent-style-name="Normale" style:family="paragraph">
      <style:text-properties fo:language="pt" fo:country="BR"/>
    </style:style>
    <style:style style:name="P184" style:parent-style-name="Normale" style:family="paragraph">
      <style:text-properties fo:color="#EE0000" fo:language="pt" fo:country="BR"/>
    </style:style>
    <style:style style:name="P185" style:parent-style-name="Normale" style:family="paragraph">
      <style:text-properties fo:color="#EE0000" fo:language="pt" fo:country="BR"/>
    </style:style>
    <style:style style:name="P186" style:parent-style-name="Normale" style:family="paragraph">
      <style:text-properties fo:color="#EE0000" fo:language="pt" fo:country="BR"/>
    </style:style>
    <style:style style:name="P187" style:parent-style-name="Normale" style:family="paragraph">
      <style:text-properties fo:language="pt" fo:country="BR"/>
    </style:style>
    <style:style style:name="P188" style:parent-style-name="Normale" style:family="paragraph">
      <style:text-properties fo:language="pt" fo:country="BR"/>
    </style:style>
    <style:style style:name="P189" style:parent-style-name="Normale" style:family="paragraph">
      <style:text-properties fo:language="pt" fo:country="BR"/>
    </style:style>
    <style:style style:name="P190" style:parent-style-name="Normale" style:family="paragraph">
      <style:text-properties fo:language="pt" fo:country="BR"/>
    </style:style>
    <style:style style:name="P191" style:parent-style-name="Normale" style:family="paragraph">
      <style:text-properties fo:language="pt" fo:country="BR"/>
    </style:style>
    <style:style style:name="P192" style:parent-style-name="Normale" style:family="paragraph">
      <style:text-properties fo:language="pt" fo:country="BR"/>
    </style:style>
    <style:style style:name="P193" style:parent-style-name="Normale" style:family="paragraph">
      <style:text-properties fo:color="#EE0000" fo:language="pt" fo:country="BR"/>
    </style:style>
    <style:style style:name="P194" style:parent-style-name="Normale" style:family="paragraph">
      <style:text-properties fo:language="pt" fo:country="BR"/>
    </style:style>
    <style:style style:name="P195" style:parent-style-name="Normale" style:family="paragraph">
      <style:text-properties fo:language="pt" fo:country="BR"/>
    </style:style>
    <style:style style:name="P196" style:parent-style-name="Normale" style:family="paragraph">
      <style:text-properties fo:language="pt" fo:country="BR"/>
    </style:style>
    <style:style style:name="P197" style:parent-style-name="Normale" style:family="paragraph">
      <style:text-properties fo:language="pt" fo:country="BR"/>
    </style:style>
    <style:style style:name="P198" style:parent-style-name="Normale" style:family="paragraph">
      <style:text-properties fo:language="pt" fo:country="BR"/>
    </style:style>
    <style:style style:name="P199" style:parent-style-name="Normale" style:family="paragraph">
      <style:text-properties fo:color="#EE0000" fo:language="pt" fo:country="BR"/>
    </style:style>
    <style:style style:name="P200" style:parent-style-name="Normale" style:family="paragraph">
      <style:text-properties fo:color="#EE0000" fo:language="pt" fo:country="BR"/>
    </style:style>
    <style:style style:name="P201" style:parent-style-name="Normale" style:family="paragraph">
      <style:text-properties fo:color="#EE0000" fo:language="pt" fo:country="BR"/>
    </style:style>
    <style:style style:name="P202" style:parent-style-name="Normale" style:family="paragraph">
      <style:text-properties fo:color="#EE0000" fo:language="pt" fo:country="BR"/>
    </style:style>
    <style:style style:name="P203" style:parent-style-name="Normale" style:family="paragraph">
      <style:text-properties fo:language="en" fo:country="GB"/>
    </style:style>
    <style:style style:name="P204" style:parent-style-name="Normale" style:family="paragraph">
      <style:text-properties fo:language="en" fo:country="GB"/>
    </style:style>
    <style:style style:name="P205" style:parent-style-name="Normale" style:family="paragraph">
      <style:text-properties fo:language="en" fo:country="GB"/>
    </style:style>
    <style:style style:name="P206" style:parent-style-name="Normale" style:family="paragraph">
      <style:text-properties fo:language="pt" fo:country="BR"/>
    </style:style>
    <style:style style:name="P207" style:parent-style-name="Normale" style:family="paragraph">
      <style:text-properties fo:color="#EE0000" fo:language="pt" fo:country="BR"/>
    </style:style>
    <style:style style:name="P208" style:parent-style-name="Normale" style:family="paragraph">
      <style:text-properties fo:color="#EE0000" fo:language="pt" fo:country="BR"/>
    </style:style>
    <style:style style:name="P209" style:parent-style-name="Normale" style:family="paragraph">
      <style:text-properties fo:language="pt" fo:country="BR"/>
    </style:style>
    <style:style style:name="P210" style:parent-style-name="Normale" style:family="paragraph">
      <style:text-properties fo:color="#EE0000" fo:language="pt" fo:country="BR"/>
    </style:style>
    <style:style style:name="P211" style:parent-style-name="Normale" style:family="paragraph">
      <style:text-properties fo:color="#EE0000" fo:language="pt" fo:country="BR"/>
    </style:style>
    <style:style style:name="P212" style:parent-style-name="Normale" style:family="paragraph">
      <style:text-properties fo:color="#EE0000" fo:language="pt" fo:country="BR"/>
    </style:style>
    <style:style style:name="P213" style:parent-style-name="Normale" style:family="paragraph">
      <style:text-properties fo:language="pt" fo:country="BR"/>
    </style:style>
    <style:style style:name="P214" style:parent-style-name="Normale" style:family="paragraph">
      <style:text-properties fo:language="pt" fo:country="BR"/>
    </style:style>
    <style:style style:name="P215" style:parent-style-name="Normale" style:family="paragraph">
      <style:text-properties fo:language="pt" fo:country="BR"/>
    </style:style>
    <style:style style:name="P216" style:parent-style-name="Normale" style:family="paragraph">
      <style:text-properties fo:language="pt" fo:country="BR"/>
    </style:style>
    <style:style style:name="P217" style:parent-style-name="Normale" style:family="paragraph">
      <style:text-properties fo:language="pt" fo:country="BR"/>
    </style:style>
    <style:style style:name="P218" style:parent-style-name="Normale" style:family="paragraph">
      <style:text-properties fo:color="#EE0000" fo:language="pt" fo:country="BR"/>
    </style:style>
    <style:style style:name="P219" style:parent-style-name="Normale" style:family="paragraph">
      <style:text-properties fo:color="#EE0000" fo:language="pt" fo:country="BR"/>
    </style:style>
    <style:style style:name="P220" style:parent-style-name="Normale" style:family="paragraph">
      <style:text-properties fo:color="#EE0000" fo:language="pt" fo:country="BR"/>
    </style:style>
    <style:style style:name="P221" style:parent-style-name="Normale" style:family="paragraph">
      <style:text-properties fo:language="pt" fo:country="BR"/>
    </style:style>
    <style:style style:name="P222" style:parent-style-name="Normale" style:family="paragraph">
      <style:text-properties fo:language="pt" fo:country="BR"/>
    </style:style>
    <style:style style:name="P223" style:parent-style-name="Normale" style:family="paragraph">
      <style:text-properties fo:language="pt" fo:country="BR"/>
    </style:style>
    <style:style style:name="T224" style:parent-style-name="Car.predefinitoparagrafo" style:family="text">
      <style:text-properties fo:language="pt" fo:country="BR"/>
    </style:style>
    <style:style style:name="T225" style:parent-style-name="Car.predefinitoparagrafo" style:family="text">
      <style:text-properties fo:color="#EE0000" fo:language="pt" fo:country="BR"/>
    </style:style>
    <style:style style:name="T226" style:parent-style-name="Car.predefinitoparagrafo" style:family="text">
      <style:text-properties fo:color="#EE0000" fo:language="pt" fo:country="BR"/>
    </style:style>
    <style:style style:name="T227" style:parent-style-name="Car.predefinitoparagrafo" style:family="text">
      <style:text-properties fo:language="pt" fo:country="BR"/>
    </style:style>
    <style:style style:name="P228" style:parent-style-name="Normale" style:family="paragraph">
      <style:text-properties fo:color="#EE0000" fo:language="pt" fo:country="BR"/>
    </style:style>
    <style:style style:name="P229" style:parent-style-name="Normale" style:family="paragraph">
      <style:text-properties fo:color="#EE0000" fo:language="pt" fo:country="BR"/>
    </style:style>
    <style:style style:name="P230" style:parent-style-name="Normale" style:family="paragraph">
      <style:text-properties fo:language="pt" fo:country="BR"/>
    </style:style>
    <style:style style:name="P231" style:parent-style-name="Normale" style:family="paragraph">
      <style:text-properties fo:color="#EE0000" fo:language="pt" fo:country="BR"/>
    </style:style>
    <style:style style:name="P232" style:parent-style-name="Normale" style:family="paragraph">
      <style:text-properties fo:language="pt" fo:country="BR"/>
    </style:style>
    <style:style style:name="P233" style:parent-style-name="Normale" style:family="paragraph">
      <style:text-properties fo:language="pt" fo:country="BR"/>
    </style:style>
    <style:style style:name="P234" style:parent-style-name="Normale" style:family="paragraph">
      <style:text-properties fo:language="pt" fo:country="BR"/>
    </style:style>
    <style:style style:name="P235" style:parent-style-name="Normale" style:family="paragraph">
      <style:text-properties fo:language="pt" fo:country="BR"/>
    </style:style>
    <style:style style:name="P236" style:parent-style-name="Normale" style:family="paragraph">
      <style:text-properties fo:language="pt" fo:country="BR"/>
    </style:style>
    <style:style style:name="P237" style:parent-style-name="Normale" style:family="paragraph">
      <style:text-properties fo:language="pt" fo:country="BR"/>
    </style:style>
    <style:style style:name="P238" style:parent-style-name="Normale" style:family="paragraph">
      <style:text-properties fo:language="pt" fo:country="BR"/>
    </style:style>
    <style:style style:name="P239" style:parent-style-name="Normale" style:family="paragraph">
      <style:text-properties fo:language="pt" fo:country="BR"/>
    </style:style>
    <style:style style:name="P240" style:parent-style-name="Normale" style:family="paragraph">
      <style:text-properties fo:language="pt" fo:country="BR"/>
    </style:style>
    <style:style style:name="P241" style:parent-style-name="Normale" style:family="paragraph">
      <style:text-properties fo:language="pt" fo:country="BR"/>
    </style:style>
    <style:style style:name="P242" style:parent-style-name="Normale" style:family="paragraph">
      <style:text-properties fo:language="pt" fo:country="BR"/>
    </style:style>
    <style:style style:name="P243" style:parent-style-name="Normale" style:family="paragraph">
      <style:text-properties fo:language="pt" fo:country="BR"/>
    </style:style>
    <style:style style:name="P244" style:parent-style-name="Normale" style:family="paragraph">
      <style:text-properties fo:language="pt" fo:country="BR"/>
    </style:style>
    <style:style style:name="P245" style:parent-style-name="Normale" style:family="paragraph">
      <style:text-properties fo:color="#EE0000" fo:language="pt" fo:country="BR"/>
    </style:style>
    <style:style style:name="P246" style:parent-style-name="Normale" style:family="paragraph">
      <style:text-properties fo:language="pt" fo:country="BR"/>
    </style:style>
    <style:style style:name="P247" style:parent-style-name="Normale" style:family="paragraph">
      <style:text-properties fo:color="#EE0000" fo:language="pt" fo:country="BR"/>
    </style:style>
    <style:style style:name="P248" style:parent-style-name="Normale" style:family="paragraph">
      <style:text-properties fo:language="pt" fo:country="BR"/>
    </style:style>
    <style:style style:name="P249" style:parent-style-name="Normale" style:family="paragraph">
      <style:text-properties fo:color="#EE0000" fo:language="pt" fo:country="BR"/>
    </style:style>
    <style:style style:name="P250" style:parent-style-name="Normale" style:family="paragraph">
      <style:text-properties fo:language="pt" fo:country="BR"/>
    </style:style>
    <style:style style:name="P251" style:parent-style-name="Normale" style:family="paragraph">
      <style:text-properties fo:language="pt" fo:country="BR"/>
    </style:style>
    <style:style style:name="P252" style:parent-style-name="Normale" style:family="paragraph">
      <style:text-properties fo:language="pt" fo:country="BR"/>
    </style:style>
    <style:style style:name="P253" style:parent-style-name="Normale" style:family="paragraph">
      <style:text-properties fo:language="pt" fo:country="BR"/>
    </style:style>
    <style:style style:name="P254" style:parent-style-name="Normale" style:family="paragraph">
      <style:text-properties fo:language="pt" fo:country="BR"/>
    </style:style>
    <style:style style:name="P255" style:parent-style-name="Normale" style:family="paragraph">
      <style:text-properties fo:language="pt" fo:country="BR"/>
    </style:style>
    <style:style style:name="P256" style:parent-style-name="Normale" style:family="paragraph">
      <style:text-properties fo:language="pt" fo:country="BR"/>
    </style:style>
    <style:style style:name="P257" style:parent-style-name="Normale" style:family="paragraph">
      <style:text-properties fo:language="pt" fo:country="BR"/>
    </style:style>
    <style:style style:name="P258" style:parent-style-name="Normale" style:family="paragraph">
      <style:text-properties fo:language="pt" fo:country="BR"/>
    </style:style>
    <style:style style:name="P259" style:parent-style-name="Normale" style:family="paragraph">
      <style:text-properties fo:color="#EE0000" fo:language="pt" fo:country="BR"/>
    </style:style>
    <style:style style:name="P260" style:parent-style-name="Normale" style:family="paragraph">
      <style:text-properties fo:language="pt" fo:country="BR"/>
    </style:style>
    <style:style style:name="P261" style:parent-style-name="Normale" style:family="paragraph">
      <style:text-properties fo:language="pt" fo:country="BR"/>
    </style:style>
    <style:style style:name="P262" style:parent-style-name="Normale" style:family="paragraph">
      <style:text-properties fo:color="#EE0000" fo:language="pt" fo:country="BR"/>
    </style:style>
    <style:style style:name="P263" style:parent-style-name="Normale" style:family="paragraph">
      <style:text-properties fo:language="pt" fo:country="BR"/>
    </style:style>
    <style:style style:name="P264" style:parent-style-name="Normale" style:family="paragraph">
      <style:text-properties fo:language="pt" fo:country="BR"/>
    </style:style>
    <style:style style:name="P265" style:parent-style-name="Normale" style:family="paragraph">
      <style:text-properties fo:language="pt" fo:country="BR"/>
    </style:style>
  </office:automatic-styles>
  <office:body>
    <office:text text:use-soft-page-breaks="true">
      <text:p text:style-name="P1">“Olá, pessoal. Neste vídeo eu vou apresentar o projeto SkillMatch JS, um simulador simples de compatibilidade entre um candidato e vagas de Front-End Júnior.</text:p>
      <text:p text:style-name="P2">O sistema compara as habilidades do candidato com os requisitos das vagas e mostra:</text:p>
      <text:p text:style-name="P3">percentual de compatibilidade;</text:p>
      <text:p text:style-name="Normale"><text:span text:style-name="T4">habilidades encontradas;</text:span></text:p>
      <text:p text:style-name="P5">habilidades faltantes;</text:p>
      <text:p text:style-name="P6">vaga mais compatível;</text:p>
      <text:p text:style-name="P7">recomendação de estudo.</text:p>
      <text:p text:style-name="P8">O objetivo principal do projeto foi praticar os conceitos fundamentais de JavaScript estudados no Módulo 01.”</text:p>
      <text:p text:style-name="P9"/>
      <text:p text:style-name="P10">// RF01 - CRIAR O PERFIL DO CANDIDATO</text:p>
      <text:p text:style-name="P11">// Criar objeto chamado candidato.</text:p>
      <text:p text:style-name="P12">// Um objeto guarda informações relacionadas dentro de uma mesma estrutura.</text:p>
      <text:p text:style-name="P13">// Neste caso, o candidato possui nome, área, habilidades e experiência.</text:p>
      <text:p text:style-name="P14">const candidato = {</text:p>
      <text:p text:style-name="P15"><text:s text:c="2"/>nome: "Luana",</text:p>
      <text:p text:style-name="P16"><text:s text:c="2"/>area: "Front-End",</text:p>
      <text:p text:style-name="Normale"><text:span text:style-name="T17"><text:s text:c="2"/></text:span><text:span text:style-name="T18">habilidades: ["JavaScript", "GitHub", "Lógica de Programação", "Kanban"],</text:span></text:p>
      <text:p text:style-name="P19"><text:s text:c="2"/>experienciaMeses: 3</text:p>
      <text:p text:style-name="P20">};</text:p>
      <text:p text:style-name="P21"/>
      <text:p text:style-name="P22">// RF02 - CRIAR UMA LISTA DE VAGAS</text:p>
      <text:p text:style-name="P23">// Antes de criar as vagas, tem que criar as classes RF09 e RF10.</text:p>
      <text:p text:style-name="P24">// Isso é necessário porque as vagas serão criadas usando "new VagaFrontEnd".</text:p>
      <text:p text:style-name="P25">// A classe precisa existir antes de ser usada, senão não funciona.</text:p>
      <text:p text:style-name="P26"/>
      <text:p text:style-name="P27">// RF09 - CRIAR UMA CLASSE</text:p>
      <text:p text:style-name="P28">// A classe funciona como um molde.</text:p>
      <text:p text:style-name="P29">// Ela define como uma vaga deve ser criada.</text:p>
      <text:p text:style-name="P30">// O constructor recebe os dados da vaga.</text:p>
      <text:soft-page-break/>
      <text:p text:style-name="P31">// O this guarda esses dados dentro do objeto criado.</text:p>
      <text:p text:style-name="P32">class Vaga {</text:p>
      <text:p text:style-name="P33"><text:s text:c="2"/>constructor(empresa, cargo, requisitos, salario, modalidade) {</text:p>
      <text:p text:style-name="P34"><text:s text:c="4"/>this.empresa = empresa;</text:p>
      <text:p text:style-name="P35"><text:s text:c="4"/>this.cargo = cargo;</text:p>
      <text:p text:style-name="P36"><text:s text:c="4"/>this.requisitos = requisitos;</text:p>
      <text:p text:style-name="P37"><text:s text:c="4"/>this.salario = salario;</text:p>
      <text:p text:style-name="P38"><text:s text:c="4"/>this.modalidade = modalidade;</text:p>
      <text:p text:style-name="P39"><text:s text:c="2"/>}</text:p>
      <text:p text:style-name="P40"><text:s text:c="2"/>// RF11 - DEMONSTRAR USO DO THIS</text:p>
      <text:p text:style-name="P41"><text:s text:c="2"/>// O método exibirResumo usa "this".</text:p>
      <text:p text:style-name="P42"><text:s text:c="2"/>// O this acessa os dados do próprio objeto.</text:p>
      <text:p text:style-name="P43"><text:s text:c="2"/>// Exemplo: this.cargo acessa o cargo da vaga atual.</text:p>
      <text:p text:style-name="P44"><text:s text:c="2"/>exibirResumo() {</text:p>
      <text:p text:style-name="P45"><text:s text:c="4"/>return `${this.cargo} na empresa ${this.empresa}`;</text:p>
      <text:p text:style-name="P46"><text:s text:c="2"/>}</text:p>
      <text:p text:style-name="P47">}</text:p>
      <text:p text:style-name="P48">// RF10 - USAR HERANÇA</text:p>
      <text:p text:style-name="P49">// A classe VagaFrontEnd herda da classe Vaga.</text:p>
      <text:p text:style-name="P50">// Isso significa que ela aproveita empresa, cargo, requisitos,</text:p>
      <text:p text:style-name="P51">// salário e modalidade da classe Vaga.</text:p>
      <text:p text:style-name="P52">// Tb crescenta uma nova informação: nivel.</text:p>
      <text:p text:style-name="P53">class VagaFrontEnd extends Vaga {</text:p>
      <text:p text:style-name="P54"><text:s text:c="2"/>constructor(empresa, cargo, requisitos, salario, modalidade, nivel) {</text:p>
      <text:p text:style-name="P55"><text:s text:c="4"/>// super chama o constructor da classe Vaga.</text:p>
      <text:p text:style-name="P56"><text:s text:c="4"/>// Sem o super, a classe filha não conseguiria herdar os dados.</text:p>
      <text:p text:style-name="P57"><text:s text:c="4"/>super(empresa, cargo, requisitos, salario, modalidade);</text:p>
      <text:p text:style-name="P58"><text:s text:c="4"/>this.nivel = nivel;</text:p>
      <text:p text:style-name="P59"><text:s text:c="2"/>}</text:p>
      <text:p text:style-name="P60"><text:s text:c="2"/>exibirNivel() {</text:p>
      <text:p text:style-name="P61"><text:s text:c="4"/>return `Nível da vaga: ${this.nivel}`;</text:p>
      <text:soft-page-break/>
      <text:p text:style-name="P62"><text:s text:c="2"/>}</text:p>
      <text:p text:style-name="P63">}</text:p>
      <text:p text:style-name="P64"/>
      <text:p text:style-name="P65">// RF02 - LISTA DE VAGAS</text:p>
      <text:p text:style-name="P66">// criar o array de vagas.</text:p>
      <text:p text:style-name="P67">// Cada vaga é um objeto criado com new VagaFrontEnd.</text:p>
      <text:p text:style-name="P68">// Array é uma lista; neste caso, lista de vagas.</text:p>
      <text:p text:style-name="P69">const vagas = [</text:p>
      <text:p text:style-name="P70"><text:s text:c="2"/>new VagaFrontEnd(</text:p>
      <text:p text:style-name="P71"><text:s text:c="4"/>"TechStart",</text:p>
      <text:p text:style-name="Normale"><text:span text:style-name="T72"><text:s text:c="4"/></text:span><text:span text:style-name="T73">"Desenvolvedor Front-End Júnior",</text:span></text:p>
      <text:p text:style-name="P74"><text:s text:c="4"/>["JavaScript", "GitHub", "Lógica de Programação"],</text:p>
      <text:p text:style-name="Normale"><text:span text:style-name="T75"><text:s text:c="4"/></text:span><text:span text:style-name="T76">2800,</text:span></text:p>
      <text:p text:style-name="P77"><text:s text:c="4"/>"Remoto",</text:p>
      <text:p text:style-name="P78"><text:s text:c="4"/>"Júnior"</text:p>
      <text:p text:style-name="P79"><text:s text:c="2"/>),</text:p>
      <text:p text:style-name="P80"><text:s text:c="2"/>new VagaFrontEnd(</text:p>
      <text:p text:style-name="P81"><text:s text:c="4"/>"CodeLab",</text:p>
      <text:p text:style-name="P82"><text:s text:c="4"/>"Estágio Front-End",</text:p>
      <text:p text:style-name="P83"><text:s text:c="4"/>["JavaScript", "Kanban", "POO"],</text:p>
      <text:p text:style-name="Normale"><text:span text:style-name="T84"><text:s text:c="4"/></text:span><text:span text:style-name="T85">1800,</text:span></text:p>
      <text:p text:style-name="P86"><text:s text:c="4"/>"Híbrido",</text:p>
      <text:p text:style-name="P87"><text:s text:c="4"/>"Estágio"</text:p>
      <text:p text:style-name="P88"><text:s text:c="2"/>),</text:p>
      <text:p text:style-name="P89"><text:s text:c="2"/>new VagaFrontEnd(</text:p>
      <text:p text:style-name="P90"><text:s text:c="4"/>"WebSolutions",</text:p>
      <text:p text:style-name="P91"><text:s text:c="4"/>"Programador JavaScript Júnior",</text:p>
      <text:p text:style-name="P92"><text:s text:c="4"/>["JavaScript", "Arrays", "Objetos", "Funções"],</text:p>
      <text:p text:style-name="P93"><text:s text:c="4"/>3000,</text:p>
      <text:p text:style-name="P94"><text:s text:c="4"/>"Presencial",</text:p>
      <text:p text:style-name="P95"><text:s text:c="4"/>"Júnior"</text:p>
      <text:soft-page-break/>
      <text:p text:style-name="P96"><text:s text:c="2"/>)</text:p>
      <text:p text:style-name="P97">];</text:p>
      <text:p text:style-name="P98">// RF04 - CLASSIFICAR A COMPATIBILIDADE</text:p>
      <text:p text:style-name="P99">// Esta função recebe o percentual de compatibilidade.</text:p>
      <text:p text:style-name="P100">// Depois, usa if para classificar o resultado.</text:p>
      <text:p text:style-name="P101">// 80% ou mais = Alta compatibilidade.</text:p>
      <text:p text:style-name="P102">// 50% até 79% = Média compatibilidade.</text:p>
      <text:p text:style-name="P103">// Abaixo de 50% = Baixa compatibilidade.</text:p>
      <text:p text:style-name="P104">const classificar = (percentual) =&gt; {</text:p>
      <text:p text:style-name="P105"><text:s text:c="2"/>if (percentual &gt;= 80) return "Alta compatibilidade";</text:p>
      <text:p text:style-name="P106"><text:s text:c="2"/>if (percentual &gt;= 50) return "Média compatibilidade";</text:p>
      <text:p text:style-name="P107"><text:s text:c="2"/>return "Baixa compatibilidade";</text:p>
      <text:p text:style-name="P108">};</text:p>
      <text:p text:style-name="P109">// RF03 - CALCULAR COMPATIBILIDADE COM CADA VAGA</text:p>
      <text:p text:style-name="P110">// RF05 - LISTAR HABILIDADES FALTANTES</text:p>
      <text:p text:style-name="P111">// RF08 - USAR MÉTODOS DE ARRAY</text:p>
      <text:p text:style-name="P112">// Esta função analisa uma vaga por vez.</text:p>
      <text:p text:style-name="P113">// Ela compara os requisitos da vaga com as habilidades do candidato.</text:p>
      <text:p text:style-name="P114">const analisarVaga = (vaga) =&gt; {</text:p>
      <text:p text:style-name="P115"><text:s text:c="2"/>// RF08 - filter</text:p>
      <text:p text:style-name="P116"><text:s text:c="2"/>// Aqui usei filter para encontrar os requisitos que o candidato possui.</text:p>
      <text:p text:style-name="P117"><text:s text:c="2"/>const encontradas = vaga.requisitos.filter((req) =&gt;</text:p>
      <text:p text:style-name="P118"><text:s text:c="4"/>candidato.habilidades.includes(req)</text:p>
      <text:p text:style-name="P119"><text:s text:c="2"/>);</text:p>
      <text:p text:style-name="P120"><text:s text:c="2"/>// RF05 - habilidades faltantes</text:p>
      <text:p text:style-name="P121"><text:s text:c="2"/>// Aqui usei filter novamente, mas com negação (!).</text:p>
      <text:p text:style-name="P122"><text:s text:c="2"/>// Assim, encontrei os requisitos que o candidato ainda não possui.</text:p>
      <text:p text:style-name="P123"><text:s text:c="2"/>const faltantes = vaga.requisitos.filter((req) =&gt;</text:p>
      <text:p text:style-name="P124"><text:s text:c="4"/>!candidato.habilidades.includes(req)</text:p>
      <text:p text:style-name="P125"><text:s text:c="2"/>);</text:p>
      <text:p text:style-name="P126"/>
      <text:soft-page-break/>
      <text:p text:style-name="Normale"><text:span text:style-name="T127"><text:s text:c="2"/></text:span><text:span text:style-name="T128">// RF03 - cálculo da compatibilidade</text:span></text:p>
      <text:p text:style-name="P129"><text:s text:c="2"/>// Fórmula:</text:p>
      <text:p text:style-name="P130"><text:s text:c="2"/>// quantidade de requisitos atendidos / total de requisitos * 100</text:p>
      <text:p text:style-name="P131"><text:s text:c="2"/>// Math.round arredonda o resultado.</text:p>
      <text:p text:style-name="P132"><text:s text:c="2"/>const compatibilidade = Math.round(</text:p>
      <text:p text:style-name="P133"><text:s text:c="4"/>(encontradas.length / vaga.requisitos.length) * 100</text:p>
      <text:p text:style-name="P134"><text:s text:c="2"/>);</text:p>
      <text:p text:style-name="P135"><text:s text:c="2"/>// Retorna um novo objeto com os dados da vaga</text:p>
      <text:p text:style-name="P136"><text:s text:c="2"/>// e também com o resultado da análise.</text:p>
      <text:p text:style-name="P137"><text:s text:c="2"/>return {</text:p>
      <text:p text:style-name="P138"><text:s text:c="4"/>...vaga,</text:p>
      <text:p text:style-name="P139"><text:s text:c="4"/>resumo: vaga.exibirResumo(),</text:p>
      <text:p text:style-name="P140"><text:s text:c="4"/>nivel: vaga.exibirNivel(),</text:p>
      <text:p text:style-name="P141"><text:s text:c="4"/>encontradas,</text:p>
      <text:p text:style-name="P142"><text:s text:c="4"/>faltantes,</text:p>
      <text:p text:style-name="P143"><text:s text:c="4"/>compatibilidade,</text:p>
      <text:p text:style-name="P144"><text:s text:c="4"/>classificacao: classificar(compatibilidade),</text:p>
      <text:p text:style-name="P145"><text:s text:c="4"/>// RF08 - every</text:p>
      <text:p text:style-name="P146"><text:s text:c="4"/>// every verifica se todos os requisitos foram atendidos.</text:p>
      <text:p text:style-name="P147"><text:s text:c="4"/>atendeTudo: vaga.requisitos.every((req) =&gt;</text:p>
      <text:p text:style-name="P148"><text:s text:c="6"/>candidato.habilidades.includes(req)</text:p>
      <text:p text:style-name="P149"><text:s text:c="4"/>)</text:p>
      <text:p text:style-name="P150"><text:s text:c="2"/>};</text:p>
      <text:p text:style-name="P151">};</text:p>
      <text:p text:style-name="P152">// RF06 - ENCONTRAR A VAGA COM MAIOR COMPATIBILIDADE</text:p>
      <text:p text:style-name="P153">// Esta função usa reduce.</text:p>
      <text:p text:style-name="P154">// O reduce percorre todos os resultados e guarda a melhor vaga.</text:p>
      <text:p text:style-name="P155">const encontrarMelhorVaga = (resultados) =&gt; {</text:p>
      <text:p text:style-name="P156"><text:s text:c="2"/>return resultados.reduce((melhor, atual) =&gt;</text:p>
      <text:p text:style-name="P157"><text:s text:c="4"/>atual.compatibilidade &gt; melhor.compatibilidade ? atual : melhor</text:p>
      <text:p text:style-name="P158"><text:s text:c="2"/>);</text:p>
      <text:soft-page-break/>
      <text:p text:style-name="P159">};</text:p>
      <text:p text:style-name="P160">// RF07 - GERAR UMA RECOMENDAÇÃO DE ESTUDO</text:p>
      <text:p text:style-name="P161">// Esta função junta todas as habilidades faltantes.</text:p>
      <text:p text:style-name="P162">// Depois remove as repetidas usando Set.</text:p>
      <text:p text:style-name="P163">// Ao final, gera uma recomendação de estudo.</text:p>
      <text:p text:style-name="P164">const gerarRecomendacao = (resultados) =&gt; {</text:p>
      <text:p text:style-name="P165"><text:s text:c="2"/>const recomendacao = [</text:p>
      <text:p text:style-name="Normale"><text:span text:style-name="T166"><text:s text:c="4"/></text:span><text:span text:style-name="T167">...new Set(resultados.flatMap((vaga) =&gt; vaga.faltantes))</text:span></text:p>
      <text:p text:style-name="P168"><text:s text:c="2"/>];</text:p>
      <text:p text:style-name="P169"><text:s text:c="2"/>return recomendacao.length</text:p>
      <text:p text:style-name="Normale"><text:span text:style-name="T170"><text:s text:c="4"/></text:span><text:span text:style-name="T171">? `Priorize estudar ${recomendacao.join(", ")}.`</text:span></text:p>
      <text:p text:style-name="P172"><text:s text:c="4"/>: "Você já atende todos os requisitos.";</text:p>
      <text:p text:style-name="P173">};</text:p>
      <text:p text:style-name="P174">// RF08 - USAR MÉTODOS DE ARRAY</text:p>
      <text:p text:style-name="P175">// map <text:s text:c="3"/>-&gt; para analisar todas as vagas</text:p>
      <text:p text:style-name="P176">// filter -&gt; para encontrar habilidades encontradas e faltantes</text:p>
      <text:p text:style-name="P177">// every <text:s/>-&gt; para verificar se todos os requisitos foram atendidos</text:p>
      <text:p text:style-name="P178">// reduce -&gt; para encontrar a melhor vaga</text:p>
      <text:p text:style-name="P179">// find <text:s text:c="2"/>-&gt; para buscar uma vaga específica</text:p>
      <text:p text:style-name="P180">// criei uma função específica usando find.</text:p>
      <text:p text:style-name="P181">const buscarVagaPorEmpresa = (vagas, empresa) =&gt; {</text:p>
      <text:p text:style-name="P182"><text:s text:c="2"/>return vagas.find((vaga) =&gt; vaga.empresa === empresa);</text:p>
      <text:p text:style-name="P183">};</text:p>
      <text:p text:style-name="P184">// RF12 - USAR CALLBACK</text:p>
      <text:p text:style-name="P185">// Callback é uma função passada como parâmetro para outra função.</text:p>
      <text:p text:style-name="P186">// Aqui, finalizarAnalise recebe uma função callback e executa no final.</text:p>
      <text:p text:style-name="P187">function finalizarAnalise(nome, callback) {</text:p>
      <text:p text:style-name="P188"><text:s text:c="2"/>console.log("\nAnálise finalizada.");</text:p>
      <text:p text:style-name="P189"><text:s text:c="2"/>callback(nome);</text:p>
      <text:p text:style-name="P190">}</text:p>
      <text:p text:style-name="P191"/>
      <text:p text:style-name="P192"/>
      <text:p text:style-name="P193">// Esta função será usada como callback.</text:p>
      <text:p text:style-name="P194">function mensagemFinal(nome) {</text:p>
      <text:p text:style-name="P195"><text:s text:c="2"/>console.log(</text:p>
      <text:p text:style-name="P196"><text:s text:c="4"/>`${nome}, revise suas habilidades faltantes e atualize seu plano de estudos.`</text:p>
      <text:p text:style-name="P197"><text:s text:c="2"/>);</text:p>
      <text:p text:style-name="P198">}</text:p>
      <text:p text:style-name="P199">// RF13 - USAR CLOSURE</text:p>
      <text:p text:style-name="P200">// Closure acontece quando uma função interna lembra</text:p>
      <text:p text:style-name="P201">// de uma variável criada fora dela.</text:p>
      <text:p text:style-name="P202">// Aqui, a função interna continua lembrando do total.</text:p>
      <text:p text:style-name="P203">function criarContadorDeAnalises() {</text:p>
      <text:p text:style-name="P204"><text:s text:c="2"/>let total = 0;</text:p>
      <text:p text:style-name="P205"><text:s text:c="2"/>return () =&gt; ++total;</text:p>
      <text:p text:style-name="P206">}</text:p>
      <text:p text:style-name="P207">// contarAnalise recebe a função interna.</text:p>
      <text:p text:style-name="P208">// Cada vez que contarAnalise é chamada, total aumenta em 1.</text:p>
      <text:p text:style-name="P209">const contarAnalise = criarContadorDeAnalises();</text:p>
      <text:p text:style-name="P210">// RF14 - USAR PROMISE</text:p>
      <text:p text:style-name="P211">// Promise simula uma operação assíncrona.</text:p>
      <text:p text:style-name="P212">// Aqui fingimos que as vagas estão sendo carregadas de um servidor.</text:p>
      <text:p text:style-name="P213">function buscarVagasSimuladas() {</text:p>
      <text:p text:style-name="P214"><text:s text:c="2"/>return new Promise((resolve) =&gt; {</text:p>
      <text:p text:style-name="P215"><text:s text:c="4"/>setTimeout(() =&gt; resolve(vagas), 1000);</text:p>
      <text:p text:style-name="P216"><text:s text:c="2"/>});</text:p>
      <text:p text:style-name="P217">}</text:p>
      <text:p text:style-name="P218">// RF14 - USAR ASYNC/AWAIT</text:p>
      <text:p text:style-name="P219">// async permite usar await.</text:p>
      <text:p text:style-name="P220">// await espera a Promise terminar antes de continuar.</text:p>
      <text:p text:style-name="P221">async function iniciarSistema() {</text:p>
      <text:p text:style-name="P222"><text:s text:c="2"/>console.log("Carregando vagas...\n");</text:p>
      <text:p text:style-name="P223"/>
      <text:p text:style-name="Normale"><text:span text:style-name="T224"><text:s text:c="2"/></text:span><text:span text:style-name="T225">// Aguarda a Promise buscarVagasSimuladas ser resolvida.</text:span></text:p>
      <text:p text:style-name="Normale"><text:span text:style-name="T226"><text:s/></text:span><text:span text:style-name="T227"><text:s/>const vagasCarregadas = await buscarVagasSimuladas();</text:span></text:p>
      <text:p text:style-name="P228"><text:s text:c="2"/>// RF08 - map</text:p>
      <text:p text:style-name="P229"><text:s text:c="2"/>// O map aplica a função analisarVaga para cada vaga.</text:p>
      <text:p text:style-name="P230"><text:s text:c="2"/>const resultados = vagasCarregadas.map(analisarVaga);</text:p>
      <text:p text:style-name="P231"><text:s text:c="2"/>// Exibe o resultado de cada vaga analisada.</text:p>
      <text:p text:style-name="P232"><text:s text:c="2"/>resultados.forEach((vaga) =&gt; {</text:p>
      <text:p text:style-name="P233"><text:s text:c="4"/>console.log("=================================");</text:p>
      <text:p text:style-name="P234"><text:s text:c="4"/>console.log(`Empresa: ${vaga.empresa}`);</text:p>
      <text:p text:style-name="P235"><text:s text:c="4"/>console.log(`Cargo: ${vaga.cargo}`);</text:p>
      <text:p text:style-name="P236"><text:s text:c="4"/>console.log(`Resumo: ${vaga.resumo}`);</text:p>
      <text:p text:style-name="P237"><text:s text:c="4"/>console.log(vaga.nivel);</text:p>
      <text:p text:style-name="P238"><text:s text:c="4"/>console.log(`Compatibilidade: ${vaga.compatibilidade}%`);</text:p>
      <text:p text:style-name="P239"><text:s text:c="4"/>console.log(`Habilidades encontradas: ${vaga.encontradas.join(", ") || "Nenhuma"}`);</text:p>
      <text:p text:style-name="P240"><text:s text:c="4"/>console.log(`Habilidades faltantes: ${vaga.faltantes.join(", ") || "Nenhuma"}`);</text:p>
      <text:p text:style-name="P241"><text:s text:c="4"/>console.log(`Atende todos os requisitos? ${vaga.atendeTudo}`);</text:p>
      <text:p text:style-name="P242"><text:s text:c="4"/>console.log(`Classificação: ${vaga.classificacao}`);</text:p>
      <text:p text:style-name="P243"><text:s text:c="4"/>console.log(`Número da análise: ${contarAnalise()}`);</text:p>
      <text:p text:style-name="P244"><text:s text:c="2"/>});</text:p>
      <text:p text:style-name="P245"><text:s text:c="2"/>// RF06 - melhor vaga</text:p>
      <text:p text:style-name="P246"><text:s text:c="2"/>const melhorVaga = encontrarMelhorVaga(resultados);</text:p>
      <text:p text:style-name="P247"><text:s text:c="2"/>// RF08 - find</text:p>
      <text:p text:style-name="P248"><text:s text:c="2"/>const vagaCodeLab = buscarVagaPorEmpresa(vagasCarregadas, "CodeLab");</text:p>
      <text:p text:style-name="P249"><text:s text:c="2"/>// RF07 - recomendação de estudo</text:p>
      <text:p text:style-name="P250"><text:s text:c="2"/>const recomendacao = gerarRecomendacao(resultados);</text:p>
      <text:p text:style-name="P251"><text:s text:c="2"/>console.log("\nVaga mais compatível:");</text:p>
      <text:p text:style-name="P252"><text:s text:c="2"/>console.log(`${melhorVaga.empresa} - ${melhorVaga.cargo}`);</text:p>
      <text:p text:style-name="P253"><text:s text:c="2"/>console.log(`Compatibilidade: ${melhorVaga.compatibilidade}%`);</text:p>
      <text:p text:style-name="P254"><text:s text:c="2"/>console.log("\nBusca com find:");</text:p>
      <text:p text:style-name="P255"><text:s text:c="2"/>console.log(vagaCodeLab.exibirResumo());</text:p>
      <text:p text:style-name="P256"/>
      <text:p text:style-name="P257"><text:s text:c="2"/>console.log("\nRecomendação de estudo:");</text:p>
      <text:p text:style-name="P258"><text:s text:c="2"/>console.log(recomendacao);</text:p>
      <text:p text:style-name="P259"><text:s text:c="2"/>// RF12 - chamada do callback</text:p>
      <text:p text:style-name="P260"><text:s text:c="2"/>finalizarAnalise(candidato.nome, mensagemFinal);</text:p>
      <text:p text:style-name="P261">}</text:p>
      <text:p text:style-name="P262">//iniciar o programa</text:p>
      <text:p text:style-name="P263">iniciarSistema().then(() =&gt; {</text:p>
      <text:p text:style-name="P264"><text:s text:c="2"/>console.log("\nSistema executado com sucesso.");</text:p>
      <text:p text:style-name="P265">})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olo4" style:display-name="Titolo 4" style:family="paragraph" style:parent-style-name="Normale" style:next-style-name="Normale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olo5" style:display-name="Titolo 5" style:family="paragraph" style:parent-style-name="Normale" style:next-style-name="Normale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olo6" style:display-name="Titolo 6" style:family="paragraph" style:parent-style-name="Normale" style:next-style-name="Normale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olo7" style:display-name="Titolo 7" style:family="paragraph" style:parent-style-name="Normale" style:next-style-name="Normale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olo8" style:display-name="Titolo 8" style:family="paragraph" style:parent-style-name="Normale" style:next-style-name="Normale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olo9" style:display-name="Titolo 9" style:family="paragraph" style:parent-style-name="Normale" style:next-style-name="Normale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Titolo1Carattere" style:display-name="Titolo 1 Carattere" style:family="text" style:parent-style-name="Car.predefinitoparagraf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olo2Carattere" style:display-name="Titolo 2 Carattere" style:family="text" style:parent-style-name="Car.predefinitoparagraf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olo3Carattere" style:display-name="Titolo 3 Carattere" style:family="text" style:parent-style-name="Car.predefinitoparagrafo">
      <style:text-properties style:font-name-asian="Times New Roman" style:font-name-complex="Times New Roman" fo:color="#0F4761" fo:font-size="14pt" style:font-size-asian="14pt" style:font-size-complex="14pt"/>
    </style:style>
    <style:style style:name="Titolo4Carattere" style:display-name="Titolo 4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0F4761"/>
    </style:style>
    <style:style style:name="Titolo5Carattere" style:display-name="Titolo 5 Carattere" style:family="text" style:parent-style-name="Car.predefinitoparagrafo">
      <style:text-properties style:font-name-asian="Times New Roman" style:font-name-complex="Times New Roman" fo:color="#0F4761"/>
    </style:style>
    <style:style style:name="Titolo6Carattere" style:display-name="Titolo 6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595959"/>
    </style:style>
    <style:style style:name="Titolo7Carattere" style:display-name="Titolo 7 Carattere" style:family="text" style:parent-style-name="Car.predefinitoparagrafo">
      <style:text-properties style:font-name-asian="Times New Roman" style:font-name-complex="Times New Roman" fo:color="#595959"/>
    </style:style>
    <style:style style:name="Titolo8Carattere" style:display-name="Titolo 8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272727"/>
    </style:style>
    <style:style style:name="Titolo9Carattere" style:display-name="Titolo 9 Carattere" style:family="text" style:parent-style-name="Car.predefinitoparagrafo">
      <style:text-properties style:font-name-asian="Times New Roman" style:font-name-complex="Times New Roman" fo:color="#272727"/>
    </style:style>
    <style:style style:name="Titolo" style:display-name="Titolo" style:family="paragraph" style:parent-style-name="Normale" style:next-style-name="Normale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oloCarattere" style:display-name="Titolo Carattere" style:family="text" style:parent-style-name="Car.predefinitoparagraf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ttotitolo" style:display-name="Sottotitolo" style:family="paragraph" style:parent-style-name="Normale" style:next-style-name="Normale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ttotitoloCarattere" style:display-name="Sottotitolo Carattere" style:family="text" style:parent-style-name="Car.predefinitoparagraf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zione" style:display-name="Citazione" style:family="paragraph" style:parent-style-name="Normale" style:next-style-name="Normale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zioneCarattere" style:display-name="Citazione Carattere" style:family="text" style:parent-style-name="Car.predefinitoparagrafo">
      <style:text-properties fo:font-style="italic" style:font-style-asian="italic" style:font-style-complex="italic" fo:color="#404040"/>
    </style:style>
    <style:style style:name="Paragrafoelenco" style:display-name="Paragrafo elenco" style:family="paragraph" style:parent-style-name="Normale">
      <style:paragraph-properties style:contextual-spacing="true" fo:margin-left="0.5in">
        <style:tab-stops/>
      </style:paragraph-properties>
      <style:text-properties fo:hyphenate="false"/>
    </style:style>
    <style:style style:name="Enfasiintensa" style:display-name="Enfasi intensa" style:family="text" style:parent-style-name="Car.predefinitoparagrafo">
      <style:text-properties fo:font-style="italic" style:font-style-asian="italic" style:font-style-complex="italic" fo:color="#0F4761"/>
    </style:style>
    <style:style style:name="Citazioneintensa" style:display-name="Citazione intensa" style:family="paragraph" style:parent-style-name="Normale" style:next-style-name="Normale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zioneintensaCarattere" style:display-name="Citazione intensa Carattere" style:family="text" style:parent-style-name="Car.predefinitoparagrafo">
      <style:text-properties fo:font-style="italic" style:font-style-asian="italic" style:font-style-complex="italic" fo:color="#0F4761"/>
    </style:style>
    <style:style style:name="Riferimentointenso" style:display-name="Riferimento intenso" style:family="text" style:parent-style-name="Car.predefinitoparagrafo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LUANA DO AMARAL LUCERA</meta:initial-creator>
    <dc:creator>LUANA DO AMARAL LUCERA</dc:creator>
    <meta:creation-date>2026-05-23T23:45:00Z</meta:creation-date>
    <dc:date>2026-05-24T00:03:00Z</dc:date>
    <meta:print-date>2026-05-23T23:58:00Z</meta:print-date>
    <meta:template xlink:href="Normal" xlink:type="simple"/>
    <meta:editing-cycles>1</meta:editing-cycles>
    <meta:editing-duration>PT1080S</meta:editing-duration>
    <meta:document-statistic meta:page-count="9" meta:paragraph-count="18" meta:word-count="1369" meta:character-count="9155" meta:row-count="65" meta:non-whitespace-character-count="7804"/>
  </office:meta>
</office:document-meta>
</file>